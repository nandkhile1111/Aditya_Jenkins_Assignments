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ill Sans MT" svg:font-family="'Gill Sans MT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1965in" style:contextual-spacing="false"/>
      <style:text-properties fo:font-weight="bold" officeooo:rsid="00afd6a9" officeooo:paragraph-rsid="00afd6a9" style:font-weight-asian="bold" style:font-weight-complex="bold"/>
    </style:style>
    <style:style style:name="P2" style:family="paragraph" style:parent-style-name="Standard">
      <style:paragraph-properties fo:margin-top="0in" fo:margin-bottom="0.1965in" style:contextual-spacing="false" fo:text-align="justify" style:justify-single-word="false"/>
      <style:text-properties fo:font-weight="bold" officeooo:rsid="00b4547b" officeooo:paragraph-rsid="00b4547b" style:font-weight-asian="bold" style:font-weight-complex="bold"/>
    </style:style>
    <style:style style:name="P3" style:family="paragraph" style:parent-style-name="Standard">
      <style:paragraph-properties fo:margin-top="0in" fo:margin-bottom="0.1965in" style:contextual-spacing="false" fo:text-align="justify" style:justify-single-word="false"/>
      <style:text-properties fo:font-weight="bold" officeooo:rsid="00a03031" style:font-weight-asian="bold" style:font-weight-complex="bold"/>
    </style:style>
    <style:style style:name="P4" style:family="paragraph" style:parent-style-name="Standard">
      <style:paragraph-properties fo:margin-top="0in" fo:margin-bottom="0.1965in" style:contextual-spacing="false" fo:text-align="justify" style:justify-single-word="false"/>
      <style:text-properties fo:font-weight="normal" officeooo:rsid="00a03031" officeooo:paragraph-rsid="00b4547b" style:font-weight-asian="normal" style:font-weight-complex="normal"/>
    </style:style>
    <style:style style:name="P5" style:family="paragraph" style:parent-style-name="Standard">
      <style:paragraph-properties fo:margin-top="0in" fo:margin-bottom="0.1965in" style:contextual-spacing="false" fo:text-align="justify" style:justify-single-word="false"/>
      <style:text-properties fo:font-weight="normal" officeooo:rsid="00a03031" officeooo:paragraph-rsid="00bfbf20" style:font-weight-asian="normal" style:font-weight-complex="normal"/>
    </style:style>
    <style:style style:name="T1" style:family="text">
      <style:text-properties officeooo:rsid="00bfbf20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nkins Assignment No : <text:span text:style-name="T1">6</text:span></text:p>
      <text:p text:style-name="P4">pipeline{</text:p>
      <text:p text:style-name="P4"><text:s text:c="4"/>agent none</text:p>
      <text:p text:style-name="P4"><text:s text:c="4"/></text:p>
      <text:p text:style-name="P4"><text:s text:c="4"/>environment {</text:p>
      <text:p text:style-name="P4"><text:s text:c="8"/>BUCKET = "my-jenkins-bucket-1111"</text:p>
      <text:p text:style-name="P4"><text:s text:c="8"/>WAR_FILE = 'app-v1.war'</text:p>
      <text:p text:style-name="P4"><text:s text:c="4"/>}</text:p>
      <text:p text:style-name="P4"><text:s text:c="5"/></text:p>
      <text:p text:style-name="P4"><text:s text:c="4"/>stages{</text:p>
      <text:p text:style-name="P4"><text:s text:c="7"/>stage('Clone the project from github...........')</text:p>
      <text:p text:style-name="P4"><text:s text:c="8"/>{</text:p>
      <text:p text:style-name="P4"><text:s text:c="12"/>agent{ label 'master' }</text:p>
      <text:p text:style-name="P4"><text:s text:c="12"/>steps</text:p>
      <text:p text:style-name="P4"><text:s text:c="12"/>{</text:p>
      <text:p text:style-name="P4"><text:s text:c="20"/>git branch: 'master', url: 'https://github.com/Shantanumajan6/project.git'</text:p>
      <text:p text:style-name="P4"><text:s text:c="12"/>}</text:p>
      <text:p text:style-name="P4"><text:s text:c="8"/>}</text:p>
      <text:p text:style-name="P4"><text:s text:c="7"/></text:p>
      <text:p text:style-name="P4"><text:s text:c="8"/>stage('Build the war file')</text:p>
      <text:p text:style-name="P4"><text:s text:c="8"/>{</text:p>
      <text:p text:style-name="P4"><text:s text:c="12"/>agent { label 'master' }</text:p>
      <text:p text:style-name="P4"><text:s text:c="12"/>steps</text:p>
      <text:p text:style-name="P4"><text:s text:c="12"/>{</text:p>
      <text:p text:style-name="P4"><text:s text:c="16"/>echo " Building the war file................"</text:p>
      <text:p text:style-name="P5"><text:s text:c="16"/>sh ''</text:p>
      <text:p text:style-name="P5"><text:soft-page-break/><text:s text:c="16"/>mvn clean install</text:p>
      <text:p text:style-name="P4"><text:s text:c="16"/>sudo cp target/*.war ${WAR_FILE}</text:p>
      <text:p text:style-name="P4"><text:s text:c="16"/>'''</text:p>
      <text:p text:style-name="P4"><text:s text:c="12"/>}</text:p>
      <text:p text:style-name="P4"><text:s text:c="8"/>}</text:p>
      <text:p text:style-name="P4"><text:s text:c="8"/></text:p>
      <text:p text:style-name="P4"><text:s text:c="8"/>stage('Copy war file into S3 bucket')</text:p>
      <text:p text:style-name="P4"><text:s text:c="8"/>{</text:p>
      <text:p text:style-name="P4"><text:s text:c="12"/>agent { label 'master' }</text:p>
      <text:p text:style-name="P4"><text:s text:c="12"/>steps</text:p>
      <text:p text:style-name="P4"><text:s text:c="12"/>{</text:p>
      <text:p text:style-name="P4"><text:s text:c="16"/>echo "Coping the war file into S3 Bucket............"</text:p>
      <text:p text:style-name="P4"><text:s text:c="16"/>sh '''</text:p>
      <text:p text:style-name="P4"><text:s text:c="17"/>aws s3 cp ${WAR_FILE} s3://${BUCKET}/${WAR_FILE}</text:p>
      <text:p text:style-name="P4"><text:s text:c="16"/>'''</text:p>
      <text:p text:style-name="P4"><text:s text:c="12"/>}</text:p>
      <text:p text:style-name="P4"><text:s text:c="8"/>}</text:p>
      <text:p text:style-name="P4"><text:s text:c="8"/></text:p>
      <text:p text:style-name="P4"><text:s text:c="8"/>stage('Download the war file into node server')</text:p>
      <text:p text:style-name="P4"><text:s text:c="8"/>{</text:p>
      <text:p text:style-name="P4"><text:s text:c="12"/>agent { label 'slave' }</text:p>
      <text:p text:style-name="P4"><text:s text:c="12"/>steps</text:p>
      <text:p text:style-name="P4"><text:s text:c="12"/>{</text:p>
      <text:p text:style-name="P4"><text:s text:c="16"/>echo "Downloading the war file from S3 Bucket into Slave node.........."</text:p>
      <text:p text:style-name="P4"><text:s text:c="16"/>sh '''</text:p>
      <text:p text:style-name="P4"><text:s text:c="16"/>aws s3 cp s3://${BUCKET}/${WAR_FILE} ${WAR_FILE}</text:p>
      <text:p text:style-name="P4"><text:soft-page-break/><text:s text:c="16"/>'''</text:p>
      <text:p text:style-name="P4"><text:s text:c="12"/>}</text:p>
      <text:p text:style-name="P4"><text:s text:c="8"/>}</text:p>
      <text:p text:style-name="P4"><text:s text:c="8"/></text:p>
      <text:p text:style-name="P4"><text:s text:c="8"/>stage('Deploy the war file into tomcat server')</text:p>
      <text:p text:style-name="P4"><text:s text:c="8"/>{</text:p>
      <text:p text:style-name="P4"><text:s text:c="12"/>agent { label 'slave' }</text:p>
      <text:p text:style-name="P4"><text:s text:c="12"/>steps</text:p>
      <text:p text:style-name="P4"><text:s text:c="12"/>{</text:p>
      <text:p text:style-name="P4"><text:s text:c="16"/>echo "Deploying the War file into tomcat server ............."</text:p>
      <text:p text:style-name="P4"><text:s text:c="16"/>// sh '''</text:p>
      <text:p text:style-name="P4"><text:s text:c="16"/>// sudo cp ${WAR_FILE} /mnt/servers/apache-tomcat-10.1.54/webapps/</text:p>
      <text:p text:style-name="P4"><text:s text:c="16"/>// sudo systemctl restart tomcat</text:p>
      <text:p text:style-name="P4"><text:s text:c="16"/>// '''</text:p>
      <text:p text:style-name="P4"><text:s text:c="16"/>sh '''</text:p>
      <text:p text:style-name="P4"><text:s text:c="20"/>sudo cp ${WAR_FILE} /mnt/servers/apache-tomcat-10.1.54/webapps/</text:p>
      <text:p text:style-name="P4"><text:s text:c="20"/></text:p>
      <text:p text:style-name="P4"><text:s text:c="20"/>sudo /mnt/servers/apache-tomcat-10.1.54/bin/shutdown.sh || true</text:p>
      <text:p text:style-name="P4"><text:s text:c="20"/>sleep 5</text:p>
      <text:p text:style-name="P4"><text:s text:c="20"/>sudo /mnt/servers/apache-tomcat-10.1.54/bin/startup.sh</text:p>
      <text:p text:style-name="P4"><text:s text:c="20"/>'''</text:p>
      <text:p text:style-name="P4"><text:s text:c="12"/>}</text:p>
      <text:p text:style-name="P4"><text:s text:c="8"/>}</text:p>
      <text:p text:style-name="P4"><text:s text:c="4"/>}</text:p>
      <text:p text:style-name="P4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ill Sans MT" svg:font-family="'Gill Sans MT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2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2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2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Gill Sans MT" style:font-family-complex="'Gill Sans MT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Gill Sans MT" style:font-family-complex="'Gill Sans MT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1" style:display-name="Title and Vertical Tex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Gliederung_20_2" style:display-name="Title and Vertical Text~LT~Gliederung 2" style:family="paragraph" style:parent-style-name="Title_20_and_20_Vertical_20_Tex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Vertical_20_Text_7e_LT_7e_Gliederung_20_3" style:display-name="Title and Vertical Text~LT~Gliederung 3" style:family="paragraph" style:parent-style-name="Title_20_and_20_Vertical_20_Tex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Vertical_20_Text_7e_LT_7e_Gliederung_20_4" style:display-name="Title and Vertical Text~LT~Gliederung 4" style:family="paragraph" style:parent-style-name="Title_20_and_20_Vertical_20_Tex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Vertical_20_Text_7e_LT_7e_Gliederung_20_5" style:display-name="Title and Vertical Text~LT~Gliederung 5" style:family="paragraph" style:parent-style-name="Title_20_and_20_Vertical_20_Tex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6" style:display-name="Title and Vertical Text~LT~Gliederung 6" style:family="paragraph" style:parent-style-name="Title_20_and_20_Vertical_20_Tex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7" style:display-name="Title and Vertical Text~LT~Gliederung 7" style:family="paragraph" style:parent-style-name="Title_20_and_20_Vertical_20_Tex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8" style:display-name="Title and Vertical Text~LT~Gliederung 8" style:family="paragraph" style:parent-style-name="Title_20_and_20_Vertical_20_Tex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9" style:display-name="Title and Vertical Text~LT~Gliederung 9" style:family="paragraph" style:parent-style-name="Title_20_and_20_Vertical_20_Tex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Titel" style:display-name="Title and Vertical Tex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Untertitel" style:display-name="Title and Vertical 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Notizen" style:display-name="Title and Vertical 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Hintergrundobjekte" style:display-name="Title and Vertical 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Vertical_20_Text_7e_LT_7e_Hintergrund" style:display-name="Title and Vertical 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ertical_20_Title_20_and_20_Text_7e_LT_7e_Gliederung_20_1" style:display-name="Vertical Title and Tex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Gliederung_20_2" style:display-name="Vertical Title and Text~LT~Gliederung 2" style:family="paragraph" style:parent-style-name="Vertical_20_Title_20_and_20_Tex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Vertical_20_Title_20_and_20_Text_7e_LT_7e_Gliederung_20_3" style:display-name="Vertical Title and Text~LT~Gliederung 3" style:family="paragraph" style:parent-style-name="Vertical_20_Title_20_and_20_Tex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20_Title_20_and_20_Text_7e_LT_7e_Gliederung_20_4" style:display-name="Vertical Title and Text~LT~Gliederung 4" style:family="paragraph" style:parent-style-name="Vertical_20_Title_20_and_20_Tex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Vertical_20_Title_20_and_20_Text_7e_LT_7e_Gliederung_20_5" style:display-name="Vertical Title and Text~LT~Gliederung 5" style:family="paragraph" style:parent-style-name="Vertical_20_Title_20_and_20_Tex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6" style:display-name="Vertical Title and Text~LT~Gliederung 6" style:family="paragraph" style:parent-style-name="Vertical_20_Title_20_and_20_Tex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7" style:display-name="Vertical Title and Text~LT~Gliederung 7" style:family="paragraph" style:parent-style-name="Vertical_20_Title_20_and_20_Tex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8" style:display-name="Vertical Title and Text~LT~Gliederung 8" style:family="paragraph" style:parent-style-name="Vertical_20_Title_20_and_20_Tex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9" style:display-name="Vertical Title and Text~LT~Gliederung 9" style:family="paragraph" style:parent-style-name="Vertical_20_Title_20_and_20_Tex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Titel" style:display-name="Vertical Title and Tex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Untertitel" style:display-name="Vertical Title and 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Notizen" style:display-name="Vertical Title and 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Hintergrundobjekte" style:display-name="Vertical Title and 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ertical_20_Title_20_and_20_Text_7e_LT_7e_Hintergrund" style:display-name="Vertical Title and 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ction_20_Header_7e_LT_7e_Gliederung_20_1" style:display-name="Section Header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Gliederung_20_2" style:display-name="Section Header~LT~Gliederung 2" style:family="paragraph" style:parent-style-name="Section_20_Header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Section_20_Header_7e_LT_7e_Gliederung_20_3" style:display-name="Section Header~LT~Gliederung 3" style:family="paragraph" style:parent-style-name="Section_20_Header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20_Header_7e_LT_7e_Gliederung_20_4" style:display-name="Section Header~LT~Gliederung 4" style:family="paragraph" style:parent-style-name="Section_20_Header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ection_20_Header_7e_LT_7e_Gliederung_20_5" style:display-name="Section Header~LT~Gliederung 5" style:family="paragraph" style:parent-style-name="Section_20_Header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6" style:display-name="Section Header~LT~Gliederung 6" style:family="paragraph" style:parent-style-name="Section_20_Header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7" style:display-name="Section Header~LT~Gliederung 7" style:family="paragraph" style:parent-style-name="Section_20_Header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8" style:display-name="Section Header~LT~Gliederung 8" style:family="paragraph" style:parent-style-name="Section_20_Header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9" style:display-name="Section Header~LT~Gliederung 9" style:family="paragraph" style:parent-style-name="Section_20_Header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Titel" style:display-name="Section Header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Untertitel" style:display-name="Section Header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Notizen" style:display-name="Section Header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Hintergrundobjekte" style:display-name="Section Head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ction_20_Header_7e_LT_7e_Hintergrund" style:display-name="Section Header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wo_20_Content_7e_LT_7e_Gliederung_20_1" style:display-name="Two Conten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Gliederung_20_2" style:display-name="Two Content~LT~Gliederung 2" style:family="paragraph" style:parent-style-name="Two_20_Conten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wo_20_Content_7e_LT_7e_Gliederung_20_3" style:display-name="Two Content~LT~Gliederung 3" style:family="paragraph" style:parent-style-name="Two_20_Conten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20_Content_7e_LT_7e_Gliederung_20_4" style:display-name="Two Content~LT~Gliederung 4" style:family="paragraph" style:parent-style-name="Two_20_Conten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wo_20_Content_7e_LT_7e_Gliederung_20_5" style:display-name="Two Content~LT~Gliederung 5" style:family="paragraph" style:parent-style-name="Two_20_Conten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6" style:display-name="Two Content~LT~Gliederung 6" style:family="paragraph" style:parent-style-name="Two_20_Conten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7" style:display-name="Two Content~LT~Gliederung 7" style:family="paragraph" style:parent-style-name="Two_20_Conten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8" style:display-name="Two Content~LT~Gliederung 8" style:family="paragraph" style:parent-style-name="Two_20_Conten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9" style:display-name="Two Content~LT~Gliederung 9" style:family="paragraph" style:parent-style-name="Two_20_Conten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Titel" style:display-name="Two Conten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Untertitel" style:display-name="Two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Notizen" style:display-name="Two Conten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Hintergrundobjekte" style:display-name="Two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wo_20_Content_7e_LT_7e_Hintergrund" style:display-name="Two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mparison_7e_LT_7e_Gliederung_20_1" style:display-name="Comparison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Gliederung_20_2" style:display-name="Comparison~LT~Gliederung 2" style:family="paragraph" style:parent-style-name="Comparison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mparison_7e_LT_7e_Gliederung_20_3" style:display-name="Comparison~LT~Gliederung 3" style:family="paragraph" style:parent-style-name="Comparison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mparison_7e_LT_7e_Gliederung_20_4" style:display-name="Comparison~LT~Gliederung 4" style:family="paragraph" style:parent-style-name="Comparison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mparison_7e_LT_7e_Gliederung_20_5" style:display-name="Comparison~LT~Gliederung 5" style:family="paragraph" style:parent-style-name="Comparison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6" style:display-name="Comparison~LT~Gliederung 6" style:family="paragraph" style:parent-style-name="Comparison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7" style:display-name="Comparison~LT~Gliederung 7" style:family="paragraph" style:parent-style-name="Comparison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8" style:display-name="Comparison~LT~Gliederung 8" style:family="paragraph" style:parent-style-name="Comparison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9" style:display-name="Comparison~LT~Gliederung 9" style:family="paragraph" style:parent-style-name="Comparison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Titel" style:display-name="Comparison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Untertitel" style:display-name="Comparis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Notizen" style:display-name="Comparison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Hintergrundobjekte" style:display-name="Comparis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mparison_7e_LT_7e_Hintergrund" style:display-name="Comparison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ntent_20_with_20_Caption_7e_LT_7e_Gliederung_20_1" style:display-name="Content with Caption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Gliederung_20_2" style:display-name="Content with Caption~LT~Gliederung 2" style:family="paragraph" style:parent-style-name="Content_20_with_20_Caption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20_with_20_Caption_7e_LT_7e_Gliederung_20_3" style:display-name="Content with Caption~LT~Gliederung 3" style:family="paragraph" style:parent-style-name="Content_20_with_20_Caption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20_with_20_Caption_7e_LT_7e_Gliederung_20_4" style:display-name="Content with Caption~LT~Gliederung 4" style:family="paragraph" style:parent-style-name="Content_20_with_20_Caption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20_with_20_Caption_7e_LT_7e_Gliederung_20_5" style:display-name="Content with Caption~LT~Gliederung 5" style:family="paragraph" style:parent-style-name="Content_20_with_20_Caption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6" style:display-name="Content with Caption~LT~Gliederung 6" style:family="paragraph" style:parent-style-name="Content_20_with_20_Caption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7" style:display-name="Content with Caption~LT~Gliederung 7" style:family="paragraph" style:parent-style-name="Content_20_with_20_Caption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8" style:display-name="Content with Caption~LT~Gliederung 8" style:family="paragraph" style:parent-style-name="Content_20_with_20_Caption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9" style:display-name="Content with Caption~LT~Gliederung 9" style:family="paragraph" style:parent-style-name="Content_20_with_20_Caption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Titel" style:display-name="Content with Caption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Untertitel" style:display-name="Content with Capti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Notizen" style:display-name="Content with Caption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Hintergrundobjekte" style:display-name="Content with Capti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ntent_20_with_20_Caption_7e_LT_7e_Hintergrund" style:display-name="Content with Ca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Picture_20_with_20_Caption_7e_LT_7e_Gliederung_20_1" style:display-name="Picture with Caption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Gliederung_20_2" style:display-name="Picture with Caption~LT~Gliederung 2" style:family="paragraph" style:parent-style-name="Picture_20_with_20_Caption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icture_20_with_20_Caption_7e_LT_7e_Gliederung_20_3" style:display-name="Picture with Caption~LT~Gliederung 3" style:family="paragraph" style:parent-style-name="Picture_20_with_20_Caption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icture_20_with_20_Caption_7e_LT_7e_Gliederung_20_4" style:display-name="Picture with Caption~LT~Gliederung 4" style:family="paragraph" style:parent-style-name="Picture_20_with_20_Caption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icture_20_with_20_Caption_7e_LT_7e_Gliederung_20_5" style:display-name="Picture with Caption~LT~Gliederung 5" style:family="paragraph" style:parent-style-name="Picture_20_with_20_Caption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6" style:display-name="Picture with Caption~LT~Gliederung 6" style:family="paragraph" style:parent-style-name="Picture_20_with_20_Caption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7" style:display-name="Picture with Caption~LT~Gliederung 7" style:family="paragraph" style:parent-style-name="Picture_20_with_20_Caption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8" style:display-name="Picture with Caption~LT~Gliederung 8" style:family="paragraph" style:parent-style-name="Picture_20_with_20_Caption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9" style:display-name="Picture with Caption~LT~Gliederung 9" style:family="paragraph" style:parent-style-name="Picture_20_with_20_Caption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Titel" style:display-name="Picture with Caption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Untertitel" style:display-name="Picture with Capti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Notizen" style:display-name="Picture with Caption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Hintergrundobjekte" style:display-name="Picture with Capti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Picture_20_with_20_Caption_7e_LT_7e_Hintergrund" style:display-name="Picture with Ca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13:18:55.206539708</meta:creation-date>
    <dc:date>2026-05-11T12:48:45.810494429</dc:date>
    <meta:editing-duration>P1DT14H37M50S</meta:editing-duration>
    <meta:editing-cycles>77</meta:editing-cycles>
    <meta:generator>LibreOffice/24.2.7.2$Linux_X86_64 LibreOffice_project/420$Build-2</meta:generator>
    <meta:document-statistic meta:table-count="0" meta:image-count="0" meta:object-count="0" meta:page-count="3" meta:paragraph-count="77" meta:word-count="193" meta:character-count="2158" meta:non-whitespace-character-count="1155"/>
  </office:meta>
</office:document-meta>
</file>