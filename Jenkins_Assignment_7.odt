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fo:font-weight="bold" officeooo:rsid="00afd6a9" officeooo:paragraph-rsid="00afd6a9" style:font-weight-asian="bold" style:font-weight-complex="bold"/>
    </style:style>
    <style:style style:name="P2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normal" officeooo:rsid="00a03031" officeooo:paragraph-rsid="00b4547b" style:font-weight-asian="normal" style:font-weight-complex="normal"/>
    </style:style>
    <style:style style:name="P3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normal" officeooo:rsid="00a03031" officeooo:paragraph-rsid="00bfbf20" style:font-weight-asian="normal" style:font-weight-complex="normal"/>
    </style:style>
    <style:style style:name="P4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normal" officeooo:rsid="00a03031" officeooo:paragraph-rsid="00b4547b" style:font-weight-asian="normal" style:font-weight-complex="normal"/>
    </style:style>
    <style:style style:name="T1" style:family="text">
      <style:text-properties officeooo:rsid="00bfbf20"/>
    </style:style>
    <style:style style:name="T2" style:family="text">
      <style:text-properties officeooo:rsid="00c1af47"/>
    </style:style>
    <style:style style:name="T3" style:family="text">
      <style:text-properties officeooo:rsid="00c3783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Assignment No : <text:span text:style-name="T3">7</text:span></text:p>
      <text:p text:style-name="P2">pipeline{</text:p>
      <text:p text:style-name="P2"><text:s text:c="4"/>agent { label 'Slave-1' }</text:p>
      <text:p text:style-name="P2"/>
      <text:p text:style-name="P2"><text:s text:c="4"/>stages {</text:p>
      <text:p text:style-name="P2"/>
      <text:p text:style-name="P2"><text:s text:c="8"/>stage('Checkout') {</text:p>
      <text:p text:style-name="P2"><text:s text:c="12"/>steps {</text:p>
      <text:p text:style-name="P2"><text:s text:c="16"/>git branch: 'master', url: 'https://github.com/Shantanumajan6/project.git'</text:p>
      <text:p text:style-name="P2"><text:s text:c="16"/></text:p>
      <text:p text:style-name="P2"><text:s text:c="12"/>}</text:p>
      <text:p text:style-name="P2"><text:s text:c="8"/>}</text:p>
      <text:p text:style-name="P2"/>
      <text:p text:style-name="P2"/>
      <text:p text:style-name="P2"><text:s text:c="8"/>stage('Build WAR') {</text:p>
      <text:p text:style-name="P2"><text:s text:c="12"/>steps {</text:p>
      <text:p text:style-name="P2"><text:s text:c="16"/>sh '''</text:p>
      <text:p text:style-name="P2"><text:s text:c="16"/>mvn clean package</text:p>
      <text:p text:style-name="P2"><text:s text:c="16"/>'''</text:p>
      <text:p text:style-name="P2"><text:s text:c="12"/>}</text:p>
      <text:p text:style-name="P2"><text:s text:c="8"/>}</text:p>
      <text:p text:style-name="P2"/>
      <text:p text:style-name="P2"><text:s text:c="8"/>stage('Deploy WAR to Tomcat') {</text:p>
      <text:p text:style-name="P2"><text:s text:c="12"/>steps {</text:p>
      <text:p text:style-name="P2"><text:s text:c="16"/>sh '''</text:p>
      <text:p text:style-name="P2"><text:s text:c="16"/>echo "Deploying WAR to Tomcat"</text:p>
      <text:p text:style-name="P2"><text:soft-page-break/></text:p>
      <text:p text:style-name="P2"><text:s text:c="16"/>sudo cp target/*.war /mnt/servers/apache-tomcat-10.1.54/webapps/</text:p>
      <text:p text:style-name="P2"/>
      <text:p text:style-name="P2"><text:s text:c="16"/>sudo /mnt/servers/apache-tomcat-10.1.54/bin/shutdown.sh || true</text:p>
      <text:p text:style-name="P2"><text:s text:c="16"/>sudo /mnt/servers/apache-tomcat-10.1.54/bin/startup.sh</text:p>
      <text:p text:style-name="P2"><text:s text:c="16"/>'''</text:p>
      <text:p text:style-name="P2"><text:s text:c="12"/>}</text:p>
      <text:p text:style-name="P2"><text:s text:c="8"/>}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3:18:55.206539708</meta:creation-date>
    <dc:date>2026-05-11T12:50:46.759543848</dc:date>
    <meta:editing-duration>P1DT14H38M55S</meta:editing-duration>
    <meta:editing-cycles>80</meta:editing-cycles>
    <meta:generator>LibreOffice/24.2.7.2$Linux_X86_64 LibreOffice_project/420$Build-2</meta:generator>
    <meta:document-statistic meta:table-count="0" meta:image-count="0" meta:object-count="0" meta:page-count="2" meta:paragraph-count="29" meta:word-count="66" meta:character-count="794" meta:non-whitespace-character-count="448"/>
  </office:meta>
</office:document-meta>
</file>