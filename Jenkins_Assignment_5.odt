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normal" officeooo:rsid="00a03031" officeooo:paragraph-rsid="00b4547b" style:font-weight-asian="normal" style:font-weight-complex="normal"/>
    </style:style>
    <style:style style:name="P2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normal" officeooo:rsid="00a03031" officeooo:paragraph-rsid="00bfbf20" style:font-weight-asian="normal" style:font-weight-complex="normal"/>
    </style:style>
    <style:style style:name="P3" style:family="paragraph" style:parent-style-name="Standard">
      <style:paragraph-properties fo:margin-top="0in" fo:margin-bottom="0.1965in" style:contextual-spacing="false"/>
      <style:text-properties fo:font-weight="normal" officeooo:rsid="00c1ff4c" officeooo:paragraph-rsid="00c1ff4c" style:font-weight-asian="normal" style:font-weight-complex="normal"/>
    </style:style>
    <style:style style:name="P4" style:family="paragraph" style:parent-style-name="Standard">
      <style:paragraph-properties fo:margin-top="0in" fo:margin-bottom="0.1965in" style:contextual-spacing="false"/>
      <style:text-properties fo:font-weight="bold" officeooo:rsid="00afd6a9" officeooo:paragraph-rsid="00afd6a9" style:font-weight-asian="bold" style:font-weight-complex="bold"/>
    </style:style>
    <style:style style:name="P5" style:family="paragraph" style:parent-style-name="Standard">
      <style:paragraph-properties fo:margin-top="0in" fo:margin-bottom="0.1965in" style:contextual-spacing="false"/>
      <style:text-properties fo:font-weight="bold" officeooo:rsid="00c1ff4c" officeooo:paragraph-rsid="00c1ff4c" style:font-weight-asian="bold" style:font-weight-complex="bold"/>
    </style:style>
    <style:style style:name="P6" style:family="paragraph" style:parent-style-name="Standard">
      <style:paragraph-properties fo:margin-top="0in" fo:margin-bottom="0.1965in" style:contextual-spacing="false"/>
      <style:text-properties officeooo:paragraph-rsid="00c1ff4c"/>
    </style:style>
    <style:style style:name="P7" style:family="paragraph" style:parent-style-name="Standard">
      <style:paragraph-properties fo:margin-top="0in" fo:margin-bottom="0.1965in" style:contextual-spacing="false"/>
      <style:text-properties officeooo:paragraph-rsid="00c3c517"/>
    </style:style>
    <style:style style:name="T1" style:family="text">
      <style:text-properties officeooo:rsid="00bfbf20"/>
    </style:style>
    <style:style style:name="T2" style:family="text">
      <style:text-properties officeooo:rsid="00c1ff4c"/>
    </style:style>
    <style:style style:name="T3" style:family="text">
      <style:text-properties fo:font-weight="normal" officeooo:rsid="00c1ff4c" style:font-weight-asian="normal" style:font-weight-complex="normal"/>
    </style:style>
    <style:style style:name="T4" style:family="text">
      <style:text-properties officeooo:rsid="00c7846f"/>
    </style:style>
    <style:style style:name="T5" style:family="text">
      <style:text-properties officeooo:rsid="00c7ce4a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enkins Assignment No : <text:span text:style-name="T2">5</text:span></text:p>
      <text:p text:style-name="P5">Matser Pipeline</text:p>
      <text:p text:style-name="P3">pipeline {</text:p>
      <text:p text:style-name="P3"><text:s text:c="4"/>agent {</text:p>
      <text:p text:style-name="P3"><text:s text:c="8"/>label 'master-client'</text:p>
      <text:p text:style-name="P3"><text:s text:c="4"/>}</text:p>
      <text:p text:style-name="P3"/>
      <text:p text:style-name="P3"><text:s text:c="4"/>stages {</text:p>
      <text:p text:style-name="P3"/>
      <text:p text:style-name="P3"><text:s text:c="8"/>stage('Clone Repository') {</text:p>
      <text:p text:style-name="P3"><text:s text:c="12"/>steps {</text:p>
      <text:p text:style-name="P3"><text:s text:c="16"/>git branch: '<text:span text:style-name="T4">main</text:span>',</text:p>
      <text:p text:style-name="P7"><text:span text:style-name="T3"><text:s text:c="16"/>url: '</text:span>https://github.com/nandkhile1111/Jenkins_Assinament_5.git<text:span text:style-name="T3">'</text:span></text:p>
      <text:p text:style-name="P3"><text:s text:c="12"/>}</text:p>
      <text:p text:style-name="P3"><text:s text:c="8"/>}</text:p>
      <text:p text:style-name="P3"/>
      <text:p text:style-name="P3"><text:s text:c="8"/>stage('Deploy index.html') {</text:p>
      <text:p text:style-name="P3"><text:s text:c="12"/>steps {</text:p>
      <text:p text:style-name="P3"><text:s text:c="16"/>sh '''</text:p>
      <text:p text:style-name="P3"><text:s text:c="16"/>sudo cp index.html /var/www/html/index.html</text:p>
      <text:p text:style-name="P3"><text:s text:c="16"/>'''</text:p>
      <text:p text:style-name="P3"><text:s text:c="12"/>}</text:p>
      <text:p text:style-name="P3"><text:s text:c="8"/>}</text:p>
      <text:p text:style-name="P3"><text:s text:c="4"/>}</text:p>
      <text:p text:style-name="P3">}</text:p>
      <text:p text:style-name="P3"/>
      <text:p text:style-name="P5"><text:soft-page-break/>2026Q1-pipeline</text:p>
      <text:p text:style-name="P3">pipeline {</text:p>
      <text:p text:style-name="P3"><text:s text:c="4"/>agent {</text:p>
      <text:p text:style-name="P3"><text:s text:c="8"/>label 'client1'</text:p>
      <text:p text:style-name="P3"><text:s text:c="4"/>}</text:p>
      <text:p text:style-name="P3"/>
      <text:p text:style-name="P3"><text:s text:c="4"/>stages {</text:p>
      <text:p text:style-name="P3"/>
      <text:p text:style-name="P3"><text:s text:c="8"/>stage('Clone Repository') {</text:p>
      <text:p text:style-name="P3"><text:s text:c="12"/>steps {</text:p>
      <text:p text:style-name="P3"><text:s text:c="16"/>git branch: '2026Q1',</text:p>
      <text:p text:style-name="P6"><text:span text:style-name="T3"><text:s text:c="16"/>url: '</text:span>https://github.com/nandkhile1111/Jenkins_Assinament_5.git<text:span text:style-name="T3">'</text:span></text:p>
      <text:p text:style-name="P3"><text:s text:c="12"/>}</text:p>
      <text:p text:style-name="P3"><text:s text:c="8"/>}</text:p>
      <text:p text:style-name="P3"/>
      <text:p text:style-name="P3"><text:s text:c="8"/>stage('Deploy index.html') {</text:p>
      <text:p text:style-name="P3"><text:s text:c="12"/>steps {</text:p>
      <text:p text:style-name="P3"><text:s text:c="16"/>sh '''</text:p>
      <text:p text:style-name="P3"><text:s text:c="16"/>sudo cp index.html /var/www/html/index.html</text:p>
      <text:p text:style-name="P3"><text:s text:c="16"/>'''</text:p>
      <text:p text:style-name="P3"><text:s text:c="12"/>}</text:p>
      <text:p text:style-name="P3"><text:s text:c="8"/>}</text:p>
      <text:p text:style-name="P3"/>
      <text:p text:style-name="P3"><text:s text:c="4"/>}</text:p>
      <text:p text:style-name="P3">}</text:p>
      <text:p text:style-name="P3"/>
      <text:p text:style-name="P5"><text:soft-page-break/>2026Q2-pipeline</text:p>
      <text:p text:style-name="P3">pipeline {</text:p>
      <text:p text:style-name="P3"><text:s text:c="4"/>agent {</text:p>
      <text:p text:style-name="P3"><text:s text:c="8"/>label 'client2'</text:p>
      <text:p text:style-name="P3"><text:s text:c="4"/>}</text:p>
      <text:p text:style-name="P3"/>
      <text:p text:style-name="P3"><text:s text:c="4"/>stages {</text:p>
      <text:p text:style-name="P3"/>
      <text:p text:style-name="P3"><text:s text:c="8"/>stage('Clone Repository') {</text:p>
      <text:p text:style-name="P3"><text:s text:c="12"/>steps {</text:p>
      <text:p text:style-name="P3"><text:s text:c="16"/>git branch: '2026Q2',</text:p>
      <text:p text:style-name="P7"><text:span text:style-name="T3"><text:s text:c="16"/>url: '</text:span>https://github.com/nandkhile1111/Jenkins_Assinament_5.git<text:span text:style-name="T3">'</text:span></text:p>
      <text:p text:style-name="P3"><text:s text:c="12"/>}</text:p>
      <text:p text:style-name="P3"><text:s text:c="8"/>}</text:p>
      <text:p text:style-name="P3"/>
      <text:p text:style-name="P3"><text:s text:c="8"/>stage('Deploy index.html') {</text:p>
      <text:p text:style-name="P3"><text:s text:c="12"/>steps {</text:p>
      <text:p text:style-name="P3"><text:s text:c="16"/>sh '''</text:p>
      <text:p text:style-name="P3"><text:s text:c="16"/>sudo cp index.html /var/www/html/index.html</text:p>
      <text:p text:style-name="P3"><text:s text:c="16"/>'''</text:p>
      <text:p text:style-name="P3"><text:s text:c="12"/>}</text:p>
      <text:p text:style-name="P3"><text:s text:c="8"/>}</text:p>
      <text:p text:style-name="P3"/>
      <text:p text:style-name="P3"><text:s text:c="4"/>}</text:p>
      <text:p text:style-name="P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3:18:55.206539708</meta:creation-date>
    <dc:date>2026-05-11T13:06:55.839102213</dc:date>
    <meta:editing-duration>P1DT14H41M33S</meta:editing-duration>
    <meta:editing-cycles>81</meta:editing-cycles>
    <meta:generator>LibreOffice/24.2.7.2$Linux_X86_64 LibreOffice_project/420$Build-2</meta:generator>
    <meta:document-statistic meta:table-count="0" meta:image-count="0" meta:object-count="0" meta:page-count="3" meta:paragraph-count="64" meta:word-count="120" meta:character-count="1385" meta:non-whitespace-character-count="777"/>
  </office:meta>
</office:document-meta>
</file>